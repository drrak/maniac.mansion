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  <style:style style:name="T3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 fo:background-color="#ffffff"/>
    </style:style>
    <style:style style:name="T4" style:family="text">
      <style:text-properties style:font-name="Consolas" fo:font-size="12pt" fo:font-weight="normal" style:font-name-asian="Consolas1" style:font-size-asian="12pt" style:font-weight-asian="normal" style:font-name-complex="Consolas1" style:font-size-complex="12pt" style:font-weight-complex="normal" fo:background-color="#ffffff"/>
    </style:style>
    <style:style style:name="T5" style:family="text">
      <style:text-properties style:font-name="Consolas" fo:font-size="12pt" officeooo:rsid="0006008d" style:font-name-asian="Consolas1" style:font-size-asian="12pt" style:font-name-complex="Consolas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Zakładka_0"/><text:span text:style-name="T1">------------------------------------------------------</text:span><text:bookmark-end text:name="Zakładka_0"/><text:span text:style-name="T1">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Internet_20_link"><text:span text:style-name="T1">Drużyna</text:span></text:span></text:a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Internet_20_link"><text:span text:style-name="T1">Lochy</text:span></text:span></text:a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Internet_20_link"><text:span text:style-name="T1">Początek</text:span></text:span></text:a></text:p>
      <text:p text:style-name="P3" loext:marker-style-name="T1"><text:span text:style-name="T1"><text:s text:c="30"/></text:span><text:a xlink:type="simple" xlink:href="#Zielona_Macka_i_Roślina" text:style-name="Internet_20_link" text:visited-style-name="Visited_20_Internet_20_Link"><text:span text:style-name="Internet_20_link"><text:span text:style-name="T1">Zielona Macka i Roślina</text:span></text:span></text:a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Internet_20_link"><text:span text:style-name="T1">Ed</text:span></text:span></text:a></text:p>
      <text:p text:style-name="P3" loext:marker-style-name="T1"><text:span text:style-name="T1"><text:s text:c="36"/></text:span><text:a xlink:type="simple" xlink:href="#Zardzewiały_klucz" text:style-name="Internet_20_link" text:visited-style-name="Visited_20_Internet_20_Link"><text:span text:style-name="Internet_20_link"><text:span text:style-name="T1">Zardzewiały klucz</text:span></text:span></text:a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Internet_20_link"><text:span text:style-name="T1">Basen</text:span></text:span></text:a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Internet_20_link"><text:span text:style-name="T1">Edna</text:span></text:span></text:a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Internet_20_link"><text:span text:style-name="T1">Sejf</text:span></text:span></text:a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Internet_20_link"><text:span text:style-name="T1">Laboratorium</text:span></text:span></text:a></text:p>
      <text:p text:style-name="P3" loext:marker-style-name="T1"><text:span text:style-name="T1"><text:s text:c="38"/></text:span><text:a xlink:type="simple" xlink:href="#Fioletowa_Macka" text:style-name="Internet_20_link" text:visited-style-name="Visited_20_Internet_20_Link"><text:span text:style-name="Internet_20_link"><text:span text:style-name="T1">Fioletowa Macka</text:span></text:span></text:a></text:p>
      <text:p text:style-name="P3" loext:marker-style-name="T1"><text:span text:style-name="T1"><text:s text:c="45"/></text:span><text:a xlink:type="simple" xlink:href="#Dr._Fred" text:style-name="Internet_20_link" text:visited-style-name="Visited_20_Internet_20_Link"><text:span text:style-name="Internet_20_link"><text:span text:style-name="T1">Dr. Fred</text:span></text:span></text:a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Internet_20_link"><text:span text:style-name="T1">Meteor</text:span></text:span></text:a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Internet_20_link"><text:span text:style-name="T1">Mapa</text:span></text:span></text:a></text:p>
      <text:p text:style-name="P3" loext:marker-style-name="T1"><text:span text:style-name="T1"><text:s text:c="43"/></text:span><text:a xlink:type="simple" xlink:href="#PC_Klawiszologia" text:style-name="Internet_20_link" text:visited-style-name="Visited_20_Internet_20_Link"><text:span text:style-name="Internet_20_link"><text:span text:style-name="T1">Sterowanie</text:span></text:span></text:a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4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4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4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_Macka_i_Roślina"/><text:span text:style-name="T4">Zielona Macka i Roślina</text:span><text:bookmark-end text:name="Zielona_Macka_i_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4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_klucz"/><text:span text:style-name="T4">Zardzewiały klucz</text:span><text:bookmark-end text:name="Zardzewiały_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4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4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4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4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_Macka"/><text:span text:style-name="T4">Fioletowa Macka</text:span><text:bookmark-end text:name="Fioletowa_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_Fred"/><text:span text:style-name="T4">Dr. Fred</text:span><text:bookmark-end text:name="Dr._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Meteor"/><text:span text:style-name="T4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</text:span><text:span text:style-name="T5">utach</text:span><text:span text:style-name="T1"> Meteor zostanie aresztowany.</text:span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bookmark-start text:name="Mapa"/><text:soft-page-break/><text:span text:style-name="T1">------------------------------------------------------</text:span>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_Klawiszologia"/><text:soft-page-break/><text:span text:style-name="T1">------------------------------------------------------</text:span><text:bookmark-end text:name="PC_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00" loext:opacity="100%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name-asian="Consolas1" style:font-family-asian="Consolas" style:font-family-generic-asian="system" style:font-pitch-asian="variable" style:font-size-asian="12pt" style:font-name-complex="Consolas1" style:font-family-complex="Consolas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.101cm" fo:margin-right="1.10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meta:print-date>2026-06-27T15:56:04</meta:print-date>
    <dc:date>2026-06-30T13:47:46.918864200</dc:date>
    <meta:editing-cycles>9</meta:editing-cycles>
    <meta:editing-duration>PT46M18S</meta:editing-duration>
    <meta:generator>LibreOffice/26.2.4.2$Windows_X86_64 LibreOffice_project/0229ac93fcf0d7cbc6376066c6f35021cef002dc</meta:generator>
    <meta:document-statistic meta:table-count="0" meta:image-count="0" meta:object-count="0" meta:page-count="12" meta:paragraph-count="216" meta:word-count="2129" meta:character-count="15472" meta:non-whitespace-character-count="12042"/>
    <meta:user-defined meta:name="AppVersion">15.0000</meta:user-defined>
  </office:meta>
</office:document-meta>
</file>