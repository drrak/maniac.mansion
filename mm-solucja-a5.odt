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1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P3" style:family="paragraph" style:parent-style-name="normal1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style:font-name-asian="Consolas1" style:font-name-complex="Consolas1" fo:background-color="#ffffff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2" style:family="text">
      <style:text-properties style:font-name="Consolas" style:font-name-asian="Consolas1" style:font-name-complex="Consolas1" fo:background-color="#ffffff"/>
    </style:style>
    <style:style style:name="T3" style:family="text">
      <style:text-properties style:font-name="Consolas" fo:font-size="12pt" fo:font-weight="bold" style:font-name-asian="Consolas1" style:font-size-asian="12pt" style:font-weight-asian="bold" style:font-name-complex="Consolas1" style:font-size-complex="12pt" style:font-weight-complex="bold" fo:background-color="#ffffff"/>
    </style:style>
    <style:style style:name="T4" style:family="text">
      <style:text-properties style:font-name="Consolas" fo:font-size="12pt" fo:font-weight="normal" style:font-name-asian="Consolas1" style:font-size-asian="12pt" style:font-weight-asian="normal" style:font-name-complex="Consolas1" style:font-size-complex="12pt" style:font-weight-complex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Zakładka_0"/><text:span text:style-name="T1">------------------------------------------------------</text:span><text:bookmark-end text:name="Zakładka_0"/><text:span text:style-name="T1">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</text:span><text:a xlink:type="simple" xlink:href="#Drużyna" text:style-name="Internet_20_link" text:visited-style-name="Visited_20_Internet_20_Link"><text:span text:style-name="Internet_20_link"><text:span text:style-name="T1">Drużyna</text:span></text:span></text:a></text:p>
      <text:p text:style-name="P3" loext:marker-style-name="T1"><text:span text:style-name="T1"><text:s text:c="48"/></text:span><text:a xlink:type="simple" xlink:href="#Lochy" text:style-name="Internet_20_link" text:visited-style-name="Visited_20_Internet_20_Link"><text:span text:style-name="Internet_20_link"><text:span text:style-name="T1">Lochy</text:span></text:span></text:a></text:p>
      <text:p text:style-name="P3" loext:marker-style-name="T1"><text:span text:style-name="T1"><text:s text:c="45"/></text:span><text:a xlink:type="simple" xlink:href="#Początek" text:style-name="Internet_20_link" text:visited-style-name="Visited_20_Internet_20_Link"><text:span text:style-name="Internet_20_link"><text:span text:style-name="T1">Początek</text:span></text:span></text:a></text:p>
      <text:p text:style-name="P3" loext:marker-style-name="T1"><text:span text:style-name="T1"><text:s text:c="30"/></text:span><text:a xlink:type="simple" xlink:href="#Zielona_Macka_i_Roślina" text:style-name="Internet_20_link" text:visited-style-name="Visited_20_Internet_20_Link"><text:span text:style-name="Internet_20_link"><text:span text:style-name="T1">Zielona Macka i Roślina</text:span></text:span></text:a></text:p>
      <text:p text:style-name="P3" loext:marker-style-name="T1"><text:span text:style-name="T1"><text:s text:c="51"/></text:span><text:a xlink:type="simple" xlink:href="#Ed" text:style-name="Internet_20_link" text:visited-style-name="Visited_20_Internet_20_Link"><text:span text:style-name="Internet_20_link"><text:span text:style-name="T1">Ed</text:span></text:span></text:a></text:p>
      <text:p text:style-name="P3" loext:marker-style-name="T1"><text:span text:style-name="T1"><text:s text:c="36"/></text:span><text:a xlink:type="simple" xlink:href="#Zardzewiały_klucz" text:style-name="Internet_20_link" text:visited-style-name="Visited_20_Internet_20_Link"><text:span text:style-name="Internet_20_link"><text:span text:style-name="T1">Zardzewiały klucz</text:span></text:span></text:a></text:p>
      <text:p text:style-name="P3" loext:marker-style-name="T1"><text:span text:style-name="T1"><text:s text:c="48"/></text:span><text:a xlink:type="simple" xlink:href="#Basen" text:style-name="Internet_20_link" text:visited-style-name="Visited_20_Internet_20_Link"><text:span text:style-name="Internet_20_link"><text:span text:style-name="T1">Basen</text:span></text:span></text:a></text:p>
      <text:p text:style-name="P3" loext:marker-style-name="T1"><text:span text:style-name="T1"><text:s text:c="49"/></text:span><text:a xlink:type="simple" xlink:href="#Edna" text:style-name="Internet_20_link" text:visited-style-name="Visited_20_Internet_20_Link"><text:span text:style-name="Internet_20_link"><text:span text:style-name="T1">Edna</text:span></text:span></text:a></text:p>
      <text:p text:style-name="P3" loext:marker-style-name="T1"><text:span text:style-name="T1"><text:s text:c="49"/></text:span><text:a xlink:type="simple" xlink:href="#Sejf" text:style-name="Internet_20_link" text:visited-style-name="Visited_20_Internet_20_Link"><text:span text:style-name="Internet_20_link"><text:span text:style-name="T1">Sejf</text:span></text:span></text:a></text:p>
      <text:p text:style-name="P3" loext:marker-style-name="T1"><text:span text:style-name="T1"><text:s text:c="41"/></text:span><text:a xlink:type="simple" xlink:href="#Laboratorium" text:style-name="Internet_20_link" text:visited-style-name="Visited_20_Internet_20_Link"><text:span text:style-name="Internet_20_link"><text:span text:style-name="T1">Laboratorium</text:span></text:span></text:a></text:p>
      <text:p text:style-name="P3" loext:marker-style-name="T1"><text:span text:style-name="T1"><text:s text:c="38"/></text:span><text:a xlink:type="simple" xlink:href="#Fioletowa_Macka" text:style-name="Internet_20_link" text:visited-style-name="Visited_20_Internet_20_Link"><text:span text:style-name="Internet_20_link"><text:span text:style-name="T1">Fioletowa Macka</text:span></text:span></text:a></text:p>
      <text:p text:style-name="P3" loext:marker-style-name="T1"><text:span text:style-name="T1"><text:s text:c="45"/></text:span><text:a xlink:type="simple" xlink:href="#Dr._Fred" text:style-name="Internet_20_link" text:visited-style-name="Visited_20_Internet_20_Link"><text:span text:style-name="Internet_20_link"><text:span text:style-name="T1">Dr. Fred</text:span></text:span></text:a></text:p>
      <text:p text:style-name="P3" loext:marker-style-name="T1"><text:span text:style-name="T1"><text:s text:c="47"/></text:span><text:a xlink:type="simple" xlink:href="#Meteor" text:style-name="Internet_20_link" text:visited-style-name="Visited_20_Internet_20_Link"><text:span text:style-name="Internet_20_link"><text:span text:style-name="T1">Meteor</text:span></text:span></text:a></text:p>
      <text:p text:style-name="P2" loext:marker-style-name="T1"/>
      <text:p text:style-name="P3" loext:marker-style-name="T1"><text:span text:style-name="T1"><text:s text:c="49"/></text:span><text:a xlink:type="simple" xlink:href="#Mapa" text:style-name="Internet_20_link" text:visited-style-name="Visited_20_Internet_20_Link"><text:span text:style-name="Internet_20_link"><text:span text:style-name="T1">Mapa</text:span></text:span></text:a></text:p>
      <text:p text:style-name="P3" loext:marker-style-name="T1"><text:span text:style-name="T1"><text:s text:c="43"/></text:span><text:a xlink:type="simple" xlink:href="#PC_Klawiszologia" text:style-name="Internet_20_link" text:visited-style-name="Visited_20_Internet_20_Link"><text:span text:style-name="Internet_20_link"><text:span text:style-name="T1">Sterowanie</text:span></text:span></text:a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3"><text:soft-page-break/><text:span text:style-name="T1"><text:s text:c="2"/></text:span><text:bookmark-start text:name="Drużyna"/><text:span text:style-name="T4">Drużyna</text:span><text:bookmark-end text:name="Druży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ochy"/><text:span text:style-name="T4">Lochy</text:span><text:bookmark-end text:name="Lochy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3"><text:soft-page-break/><text:span text:style-name="T1"><text:s text:c="2"/></text:span><text:bookmark-start text:name="Początek"/><text:span text:style-name="T4">Początek</text:span><text:bookmark-end text:name="Początek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ielona_Macka_i_Roślina"/><text:span text:style-name="T4">Zielona Macka i Roślina</text:span><text:bookmark-end text:name="Zielona_Macka_i_Rośli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</text:span><text:span text:style-name="T3">UWAGA!</text:span><text:span text:style-name="T1"> Jak tylko usłyszysz dzwonek do drzwi, biegnij po paczkę przed domem. Jeśli w drużynie jest Wendy, Razor albo Syd, nie zapomnij oderwać znaczków z paczki. Dla Michaela najważniejsza jest sama paczka. Zostaw mu ją.</text:span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Ed"/><text:span text:style-name="T4">Ed</text:span><text:bookmark-end text:name="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text:span text:style-name="T1"/></text:p>
      <text:p text:style-name="P3" loext:marker-style-name="T1"><text:soft-page-break/><text:span text:style-name="T1"><text:s text:c="2"/></text:span><text:span text:style-name="T1"/></text:p>
      <text:p text:style-name="P3" loext:marker-style-name="T1"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ardzewiały_klucz"/><text:span text:style-name="T4">Zardzewiały klucz</text:span><text:bookmark-end text:name="Zardzewiały_klucz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Basen"/><text:span text:style-name="T4">Basen</text:span><text:bookmark-end text:name="Basen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</text:span><text:soft-page-break/><text:span text:style-name="T1">bagażnik, w środku znajdziesz narzędzia.</text:span><text:span text:style-name="T1"/></text:p>
      <text:p text:style-name="P2" loext:marker-style-name="T1"/>
      <text:p text:style-name="P3" loext:marker-style-name="T1"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Edna"/><text:span text:style-name="T4">Edna</text:span><text:bookmark-end text:name="Ed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</text:span><text:soft-page-break/><text:span text:style-name="T1">jednym z dzieciaków. Zanim Edna wróci następny dzieciak wchodzi, podnosi mały klucz i wspina się po 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Sejf"/><text:span text:style-name="T4">Sejf</text:span><text:bookmark-end text:name="Sejf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</text:span><text:span text:style-name="T3">UWAGA!</text:span><text:span text:style-name="T1"> Jeśli w drużynie jest Wendy, Razor albo Syd, nie otwieraj koperty! Otworzysz ją dopiero w kuchni, po użyciu mikrofalówki i wody.</text:span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aboratorium"/><text:span text:style-name="T4">Laboratorium</text:span><text:bookmark-end text:name="Laboratorium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Fioletowa_Macka"/><text:span text:style-name="T4">Fioletowa Macka</text:span><text:bookmark-end text:name="Fioletowa_Macka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oft-page-break/><text:span text:style-name="T1"><text:s text:c="2"/>Świecący klucz i szyfr otworzą drzwi do laboratorium. Zanim tam wejdziesz, przygotuj się na 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 otrzymasz kontrakt. </text:span><text:soft-page-break/><text:span text:style-name="T1">Fioletowy przepuści cię, kiedy mu go pokażesz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Dr._Fred"/><text:span text:style-name="T4">Dr. Fred</text:span><text:bookmark-end text:name="Dr._Fr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.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Meteor"/><text:span text:style-name="T4">Meteor</text:span><text:bookmark-end text:name="Meteor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ę Bernardem. Po 5 min Meteor zostanie aresztowany.</text:span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ę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3" loext:marker-style-name="T1"><text:bookmark-start text:name="Mapa"/><text:soft-page-break/><text:span text:style-name="T1">------------------------------------------------------</text:span><text:bookmark-end text:name="Mapa"/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bookmark-start text:name="PC_Klawiszologia"/><text:soft-page-break/><text:span text:style-name="T1">------------------------------------------------------</text:span><text:bookmark-end text:name="PC_Klawiszologia"/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Internet_20_link" style:display-name="Internet link" style:family="text">
      <style:text-properties fo:color="#000000" loext:opacity="100%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font-name-asian="Consolas1" style:font-family-asian="Consolas" style:font-family-generic-asian="system" style:font-pitch-asian="variable" style:font-size-asian="12pt" style:font-name-complex="Consolas1" style:font-family-complex="Consolas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.101cm" fo:margin-right="1.101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l-PL</dc:language>
    <meta:print-date>2026-06-27T15:56:04</meta:print-date>
    <dc:date>2026-06-30T13:33:48.949490600</dc:date>
    <meta:editing-cycles>8</meta:editing-cycles>
    <meta:editing-duration>PT46M10S</meta:editing-duration>
    <meta:generator>LibreOffice/26.2.4.2$Windows_X86_64 LibreOffice_project/0229ac93fcf0d7cbc6376066c6f35021cef002dc</meta:generator>
    <meta:document-statistic meta:table-count="0" meta:image-count="0" meta:object-count="0" meta:page-count="12" meta:paragraph-count="216" meta:word-count="2129" meta:character-count="15467" meta:non-whitespace-character-count="12037"/>
    <meta:user-defined meta:name="AppVersion">15.0000</meta:user-defined>
  </office:meta>
</office:document-meta>
</file>